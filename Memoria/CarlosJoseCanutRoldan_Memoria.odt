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list-style-name="L1"/>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bookmark text:name="1-definicin-del-prototipo"/>1. Definición del prototipo</text:h>
      <text:p text:style-name="Text_20_body">El prototipo desarrollado consiste en un juego de plataformas en tercera persona en el que el jugador controla un personaje que debe avanzar por un escenario tridimensional, recoger monedas y gestionar el uso de un jetpack para superar huecos, alcanzar zonas elevadas y prolongar sus desplazamientos en el aire. El objetivo principal del prototipo es validar la sensación de movimiento, la legibilidad de los controles y la comprensión de la mecánica de consumo y recuperación de fuel.</text:p>
      <text:p text:style-name="Text_20_body">El control del personaje se basa en las teclas WASD para desplazamiento, el espacio para realizar el salto y dos entradas para activar el jetpack: la tecla Left Shift y el botón derecho del ratón. Esta doble asignación permite comprobar cuál de las dos opciones resulta más cómoda e intuitiva para los jugadores durante las pruebas. La mecánica central del diseño es que el jetpack no puede utilizarse de forma ilimitada, sino que depende de un recurso consumible que debe recuperarse durante la partida.</text:p>
      <text:p text:style-name="Text_20_body">Para equilibrar el sistema, se incorporaron esferas repartidas por el nivel que permiten recuperar fuel. Así, el jugador debe decidir cuándo gastar combustible para ganar altura o corregir su trayectoria y cuándo conservarlo para no quedarse sin capacidad de vuelo en momentos críticos. El prototipo se define, por tanto, como una prueba jugable enfocada en movilidad, gestión de recursos y lectura espacial del entorno.<text:a xlink:type="simple" xlink:href="https://platzi.com/cursos/programacion-basica/movimientos-con-el-teclado/" office:target-frame-name="_blank" xlink:show="new" text:style-name="Internet_20_link" text:visited-style-name="Visited_20_Internet_20_Link">platzi</text:a></text:p>
      <text:h text:style-name="Heading_20_2" text:outline-level="2"><text:bookmark text:name="2-mecnicas-de-movimiento"/>2. Mecánicas de movimiento</text:h>
      <text:p text:style-name="Text_20_body">El movimiento básico se controla con las teclas WASD. W desplaza al personaje hacia delante, S hacia atrás, A hacia la izquierda y D hacia la derecha. Esta base de control permite al jugador orientarse con rapidez en un espacio tridimensional y combinar el desplazamiento con la cámara en tercera persona.</text:p>
      <text:p text:style-name="Text_20_body">El salto se ejecuta con la barra espaciadora y sirve para superar obstáculos de baja altura o iniciar una secuencia de movimiento aéreo antes de activar el jetpack. Por su parte, el jetpack se activa manteniendo pulsado Left Shift o el botón derecho del ratón, lo que eleva al personaje mientras exista fuel disponible. Cuando el combustible se agota, el sistema limita el ascenso y obliga al jugador a buscar esferas de recarga para continuar avanzando.</text:p>
      <text:p text:style-name="Text_20_body">Las esferas de fuel funcionan como puntos de interés dentro del nivel. No solo cumplen una función práctica, sino que también orientan la ruta del jugador y marcan un ritmo de exploración y riesgo. De este modo, el movimiento no es únicamente locomoción, sino una combinación de decisión, gestión de energía y lectura del entorno.<text:a xlink:type="simple" xlink:href="https://platzi.com/cursos/programacion-basica/movimientos-con-el-teclado/" office:target-frame-name="_blank" xlink:show="new" text:style-name="Internet_20_link" text:visited-style-name="Visited_20_Internet_20_Link">platzi</text:a></text:p>
      <text:h text:style-name="Heading_20_2" text:outline-level="2"><text:bookmark text:name="3-proceso-del-jetpack"/>3. Proceso del jetpack</text:h>
      <text:p text:style-name="Text_20_body">La creación del jetpack partió de una idea sencilla: convertir el movimiento vertical en una mecánica limitada, útil y fácil de entender. Primero se definió su comportamiento básico, es decir, que al mantener pulsado el control correspondiente el personaje ganara altura y que, al soltarlo, dejara de impulsarse. Después se añadió la variable de fuel para introducir tensión y evitar un uso permanente del vuelo.</text:p>
      <text:p text:style-name="Text_20_body"><text:soft-page-break/>Durante el proceso de implementación fue importante ajustar la sensación de peso y de empuje. Si el impulso era demasiado fuerte, el personaje perdía control; si era demasiado débil, la mecánica dejaba de sentirse satisfactoria. También se comprobó la necesidad de comunicar visualmente el estado del recurso, para que el jugador entendiera cuándo podía seguir usando el jetpack y cuándo debía recuperar combustible.</text:p>
      <text:p text:style-name="Text_20_body">El resultado fue un sistema funcional que convirtió el jetpack en la mecánica diferenciadora del prototipo. Más que un simple salto prolongado, pasó a ser una herramienta estratégica que condiciona la exploración, el recorrido y la relación del jugador con el escenario.<text:a xlink:type="simple" xlink:href="https://platzi.com/cursos/programacion-basica/movimientos-con-el-teclado/" office:target-frame-name="_blank" xlink:show="new" text:style-name="Internet_20_link" text:visited-style-name="Visited_20_Internet_20_Link">platzi</text:a></text:p>
      <text:h text:style-name="Heading_20_2" text:outline-level="2"><text:bookmark text:name="4-playtest-y-observaciones"/>4. Playtest y observaciones</text:h>
      <text:p text:style-name="Text_20_body">El playtest permitió comprobar que la idea general del juego resultaba comprensible y que los jugadores entendían rápidamente la relación entre movimiento, salto, jetpack y recogida de monedas. En general, la mayoría de participantes interpretó el juego como un prototipo de desplazamiento vertical y exploración, y valoró positivamente que la mecánica de fuel añadiera una capa de estrategia.</text:p>
      <text:p text:style-name="Text_20_body">Sin embargo, también aparecieron problemas de control y de lectura del comportamiento del jetpack. Algunos jugadores tendieron a mantener pulsado el botón de activación durante demasiado tiempo, esperando que el personaje dejara de ascender de forma automática. Esto generó una sensación extraña en el aire y reveló una incidencia importante: el personaje podía seguir flotando hasta que el usuario soltara el botón, lo que convertía la mecánica en algo menos preciso de lo deseado.</text:p>
      <text:p text:style-name="Text_20_body">A partir de estas observaciones, el playtest sirvió para detectar que el prototipo necesitaba una mejor respuesta de interrupción, más claridad en el consumo de fuel y posiblemente una retroalimentación visual o sonora más evidente. También mostró que la doble asignación del jetpack podía ser útil, aunque no todos los jugadores la percibieron con la misma naturalidad.<text:a xlink:type="simple" xlink:href="https://platzi.com/cursos/programacion-basica/movimientos-con-el-teclado/" office:target-frame-name="_blank" xlink:show="new" text:style-name="Internet_20_link" text:visited-style-name="Visited_20_Internet_20_Link">platzi</text:a></text:p>
      <text:h text:style-name="Heading_20_2" text:outline-level="2"><text:bookmark text:name="5-bugs-e-incidencias"/>5. Bugs e incidencias</text:h>
      <text:p text:style-name="Text_20_body">El bug más relevante fue el de seguir flotando mientras se mantenía pulsado el botón del jetpack, incluso cuando la situación de juego sugería que la acción ya debería haberse frenado. Este problema afectó a la sensación de control y provocó que el movimiento aéreo se percibiera como menos robusto de lo esperado. En un juego de plataformas, este tipo de error es especialmente importante porque altera la precisión del salto y la confianza del jugador.</text:p>
      <text:p text:style-name="Text_20_body">Otra incidencia detectada fue la necesidad de ajustar el consumo de fuel para que la mecánica no se sintiera ni demasiado permisiva ni demasiado restrictiva. Si el recurso se agotaba demasiado rápido, el jugador se frustraba; si tardaba demasiado en agotarse, desaparecía el componente de gestión. También se observó que la colocación de las esferas influía directamente en el ritmo del nivel y en la facilidad de navegación.</text:p>
      <text:p text:style-name="Text_20_body">Estas incidencias no se consideraron fallos menores, sino datos útiles para orientar las iteraciones posteriores. En un prototipo, los bugs cumplen una función informativa porque revelan dónde el sistema todavía no comunica bien sus reglas.<text:a xlink:type="simple" xlink:href="https://platzi.com/cursos/programacion-basica/movimientos-con-el-teclado/" office:target-frame-name="_blank" xlink:show="new" text:style-name="Internet_20_link" text:visited-style-name="Visited_20_Internet_20_Link">platzi</text:a></text:p>
      <text:h text:style-name="Heading_20_2" text:outline-level="2"><text:bookmark text:name="6-iteraciones-realizadas"/><text:soft-page-break/>6. Iteraciones realizadas</text:h>
      <text:p text:style-name="Text_20_body">La primera iteración se centró en conseguir un control base estable: mover al personaje, saltar y activar el jetpack con una respuesta mínima funcional. La segunda iteración introdujo el fuel y las esferas de recarga, con el objetivo de que el jetpack dejara de ser una habilidad ilimitada. La tercera iteración ajustó parámetros de movimiento, duración del impulso y colocación de los elementos de recuperación dentro del nivel.</text:p>
      <text:p text:style-name="Text_20_body">A nivel de diseño, cada iteración respondió a una pregunta concreta: si el movimiento era entendible, si el jetpack era divertido y si la gestión del combustible añadía decisión en lugar de confusión. A nivel técnico, las pruebas ayudaron a localizar el problema del floteo prolongado y a mejorar la consistencia del comportamiento aéreo. Además, la evolución del prototipo mostró que la experiencia ganaba claridad cuando el jugador podía prever mejor cuándo debía usar el jetpack y cuándo debía conservar fuel.</text:p>
      <text:p text:style-name="Text_20_body">En total, el desarrollo puede describirse como un proceso de iteración corta y continua, orientado a depurar la jugabilidad antes de escalar el contenido. Esto encaja bien con la lógica de un prototipo académico, cuyo objetivo principal no es cerrar un producto final, sino validar mecánicas y detectar problemas.<text:a xlink:type="simple" xlink:href="https://platzi.com/cursos/programacion-basica/movimientos-con-el-teclado/" office:target-frame-name="_blank" xlink:show="new" text:style-name="Internet_20_link" text:visited-style-name="Visited_20_Internet_20_Link">platzi</text:a></text:p>
      <text:h text:style-name="Heading_20_2" text:outline-level="2"><text:bookmark text:name="7-duracin-y-desarrollo"/>7. Duración y desarrollo</text:h>
      <text:p text:style-name="Text_20_body">El desarrollo se organizó en varias sesiones de trabajo a lo largo de un periodo breve, con un número reducido de iteraciones para priorizar la validación de la mecánica principal. La duración total dependió del ritmo de implementación, de prueba y de ajuste, pero el foco estuvo en construir una experiencia jugable mínima y analizar su funcionamiento mediante pruebas con usuarios.</text:p>
      <text:p text:style-name="Text_20_body">Las partidas del playtest permitieron observar reacciones diversas. Algunos jugadores destacaron la sensación de libertad que produce el jetpack, mientras que otros señalaron que el control aéreo requería más precisión. También aparecieron comentarios sobre la necesidad de señales más claras para el fuel y sobre la conveniencia de hacer más visible la diferencia entre salto y propulsión.</text:p>
      <text:p text:style-name="Text_20_body">En conjunto, el desarrollo mostró que la propuesta tiene potencial como base para un juego más completo, siempre que se siga refinando el control, la comunicación de estado y el diseño del nivel. La experiencia obtenida en estas iteraciones permite establecer una base sólida para futuras mejoras.<text:a xlink:type="simple" xlink:href="https://platzi.com/cursos/programacion-basica/movimientos-con-el-teclado/" office:target-frame-name="_blank" xlink:show="new" text:style-name="Internet_20_link" text:visited-style-name="Visited_20_Internet_20_Link">platzi</text:a></text:p>
      <text:h text:style-name="Heading_20_2" text:outline-level="2"><text:bookmark text:name="8-cambios-realizados"/>8. Cambios realizados</text:h>
      <text:p text:style-name="Text_20_body">Entre los cambios más importantes realizados tras el playtest destacan los siguientes:</text:p>
      <text:list xml:id="list3072073461" text:style-name="L1">
        <text:list-item>
          <text:p text:style-name="P1">Ajuste del control del jetpack para mejorar su respuesta.</text:p>
        </text:list-item>
        <text:list-item>
          <text:p text:style-name="P1">Revisión del consumo de fuel.</text:p>
        </text:list-item>
        <text:list-item>
          <text:p text:style-name="P1">Incorporación de esferas de recarga en puntos estratégicos.</text:p>
        </text:list-item>
        <text:list-item>
          <text:p text:style-name="P1">Ajustes en el salto para diferenciarlo mejor del impulso aéreo.</text:p>
        </text:list-item>
        <text:list-item>
          <text:p text:style-name="P1">Reorganización del nivel para guiar mejor al jugador.</text:p>
        </text:list-item>
        <text:list-item>
          <text:p text:style-name="P1">Revisión del feedback visual del jetpack y del recurso.</text:p>
        </text:list-item>
        <text:list-item>
          <text:p text:style-name="P1"><text:soft-page-break/>Corrección del bug de flotación prolongada.</text:p>
        </text:list-item>
        <text:list-item>
          <text:p text:style-name="P1">Simplificación de algunos elementos para centrar la atención en la mecánica principal.</text:p>
        </text:list-item>
      </text:list>
      <text:p text:style-name="Text_20_body">Este conjunto de cambios permitió mejorar la comprensión del prototipo y reforzar su identidad como juego de plataformas en tercera persona con movilidad vertical y gestión de recurso.</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6-26T17:46:26.874000000</meta:creation-date>
    <dc:date>2026-06-26T17:48:07.956000000</dc:date>
    <meta:editing-duration>PT1M41S</meta:editing-duration>
    <meta:editing-cycles>1</meta:editing-cycles>
    <meta:document-statistic meta:table-count="0" meta:image-count="0" meta:object-count="0" meta:page-count="4" meta:paragraph-count="39" meta:word-count="1453" meta:character-count="9242" meta:non-whitespace-character-count="7836"/>
    <meta:generator>LibreOffice/7.1.3.2$Windows_X86_64 LibreOffice_project/47f78053abe362b9384784d31a6e56f8511eb1c1</meta:generator>
  </office:meta>
</office:document-meta>
</file>